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8dae" officeooo:paragraph-rsid="000a8dae"/>
    </style:style>
    <style:style style:name="P2" style:family="paragraph" style:parent-style-name="Text_20_body">
      <style:text-properties officeooo:rsid="00130ccc" officeooo:paragraph-rsid="0012add6"/>
    </style:style>
    <style:style style:name="P3" style:family="paragraph" style:parent-style-name="Text_20_body">
      <style:text-properties officeooo:rsid="0010145a" officeooo:paragraph-rsid="0010145a"/>
    </style:style>
    <style:style style:name="P4" style:family="paragraph" style:parent-style-name="Text_20_body">
      <style:text-properties officeooo:rsid="00133242" officeooo:paragraph-rsid="00133242"/>
    </style:style>
    <style:style style:name="P5" style:family="paragraph" style:parent-style-name="Heading_20_1">
      <style:text-properties officeooo:rsid="000a8dae" officeooo:paragraph-rsid="000a8dae"/>
    </style:style>
    <style:style style:name="P6" style:family="paragraph" style:parent-style-name="Heading_20_1">
      <style:text-properties officeooo:rsid="001916b1" officeooo:paragraph-rsid="001916b1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Standard" style:list-style-name="L1">
      <style:text-properties officeooo:rsid="0009cbc6" officeooo:paragraph-rsid="0009cbc6"/>
    </style:style>
    <style:style style:name="P11" style:family="paragraph" style:parent-style-name="Standard" style:list-style-name="L1">
      <style:text-properties officeooo:rsid="0009cbc6" officeooo:paragraph-rsid="000a8dae"/>
    </style:style>
    <style:style style:name="P12" style:family="paragraph" style:parent-style-name="Standard" style:list-style-name="L2">
      <style:text-properties officeooo:rsid="0009cbc6" officeooo:paragraph-rsid="0009cbc6"/>
    </style:style>
    <style:style style:name="P13" style:family="paragraph" style:parent-style-name="Standard" style:list-style-name="L3">
      <style:text-properties officeooo:rsid="0009cbc6" officeooo:paragraph-rsid="000a8dae"/>
    </style:style>
    <style:style style:name="P14" style:family="paragraph" style:parent-style-name="Standard" style:list-style-name="L1">
      <style:text-properties officeooo:rsid="000a8dae" officeooo:paragraph-rsid="000a8dae"/>
    </style:style>
    <style:style style:name="P15" style:family="paragraph" style:parent-style-name="Standard" style:list-style-name="L3">
      <style:text-properties officeooo:rsid="00130ccc" officeooo:paragraph-rsid="00130ccc"/>
    </style:style>
    <style:style style:name="P16" style:family="paragraph" style:parent-style-name="Text_20_body" style:list-style-name="L4">
      <style:text-properties officeooo:rsid="0012add6" officeooo:paragraph-rsid="0012add6"/>
    </style:style>
    <style:style style:name="P17" style:family="paragraph" style:parent-style-name="Text_20_body" style:list-style-name="L5">
      <style:text-properties officeooo:rsid="0012add6" officeooo:paragraph-rsid="00133242"/>
    </style:style>
    <style:style style:name="P18" style:family="paragraph" style:parent-style-name="Text_20_body" style:list-style-name="L4">
      <style:text-properties officeooo:rsid="00133242" officeooo:paragraph-rsid="00133242"/>
    </style:style>
    <style:style style:name="P19" style:family="paragraph" style:parent-style-name="Text_20_body" style:list-style-name="L5">
      <style:text-properties officeooo:paragraph-rsid="0012add6"/>
    </style:style>
    <style:style style:name="P20" style:family="paragraph" style:parent-style-name="Text_20_body" style:list-style-name="L5">
      <style:text-properties officeooo:rsid="00130ccc" officeooo:paragraph-rsid="00133242"/>
    </style:style>
    <style:style style:name="T1" style:family="text">
      <style:text-properties officeooo:rsid="000a8dae"/>
    </style:style>
    <style:style style:name="T2" style:family="text">
      <style:text-properties style:font-name="Liberation Serif" officeooo:rsid="000a8dae"/>
    </style:style>
    <style:style style:name="T3" style:family="text">
      <style:text-properties style:font-name="Liberation Serif1" officeooo:rsid="000a8dae"/>
    </style:style>
    <style:style style:name="T4" style:family="text">
      <style:text-properties officeooo:rsid="000ee8bf"/>
    </style:style>
    <style:style style:name="T5" style:family="text">
      <style:text-properties officeooo:rsid="0012add6"/>
    </style:style>
    <style:style style:name="T6" style:family="text">
      <style:text-properties officeooo:rsid="00130ccc"/>
    </style:style>
    <style:style style:name="T7" style:family="text">
      <style:text-properties officeooo:rsid="0010145a"/>
    </style:style>
    <style:style style:name="T8" style:family="text">
      <style:text-properties officeooo:rsid="00133242"/>
    </style:style>
    <style:style style:name="T9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mple gene evolution <text:span text:style-name="T1">simulation</text:span></text:p>
      <text:h text:style-name="P5" text:outline-level="1">Idea</text:h>
      <text:p text:style-name="P1">Náhodným vznikom molekuly, ktorá dokázala samu seba skopírovať zo zdrojov v jej okolí sa začali preteky o to aká jej verzia sa dokáže namnožiť najviac. Skúsime ich zápolenie nasimulovať a zistiť, ktorá verzia prevláda po danom "čase", resp. zistiť, či sa na nejakej verzii vývoj zastabilizuje.</text:p>
      <text:h text:style-name="Heading_20_1" text:outline-level="1"><text:span text:style-name="T1">I</text:span>nput</text:h>
      <text:list xml:id="list1681195080" text:style-name="L1">
        <text:list-item>
          <text:p text:style-name="P10">spawn rate <text:span text:style-name="T1">(s)</text:span> – <text:span text:style-name="T1">ako často vznikne molekula schopná samoreplikácie</text:span></text:p>
        </text:list-item>
        <text:list-item>
          <text:p text:style-name="P10">death rate <text:span text:style-name="T1">(d)</text:span> – <text:span text:style-name="T1">ako často sa molekula rozpadne na nefunkčné diely</text:span></text:p>
        </text:list-item>
        <text:list-item>
          <text:p text:style-name="P10">replication rate <text:span text:style-name="T1">(r)</text:span> – <text:span text:style-name="T1">ako často molekula vytvorí kópiu seba samej</text:span></text:p>
          <text:list>
            <text:list-item>
              <text:p text:style-name="P11">resource factor – <text:span text:style-name="T1">obmedzenie potenciálu replikácie dostupnými zdrojmi podľa vzorca <text:line-break/>r = r </text:span><text:span text:style-name="T2">×</text:span><text:span text:style-name="T3"> </text:span>(1-N/C) </text:p>
            </text:list-item>
            <text:list-item>
              <text:p text:style-name="P11">N = <text:span text:style-name="T1">aktuálny počet existujúcich molekúl</text:span></text:p>
            </text:list-item>
            <text:list-item>
              <text:p text:style-name="P11">C = arbitrary crowding factor</text:p>
            </text:list-item>
          </text:list>
        </text:list-item>
        <text:list-item>
          <text:p text:style-name="P10">mutation rate – <text:span text:style-name="T1">pravdepodobnosť s akou nová kópia bude mať o niečo iné staty</text:span></text:p>
        </text:list-item>
        <text:list-item>
          <text:p text:style-name="P14">variation rate – ako veľmi budú kolísať nové staty v prípade mutácie</text:p>
        </text:list-item>
        <text:list-item>
          <text:p text:style-name="P10">number of steps / end condition?</text:p>
        </text:list-item>
      </text:list>
      <text:h text:style-name="Heading_20_1" text:outline-level="1"><text:span text:style-name="T1">R</text:span>ules</text:h>
      <text:list xml:id="list2174721440" text:style-name="L2">
        <text:list-item>
          <text:p text:style-name="P12">new mutations inherit stats, but "slightly" randomized</text:p>
        </text:list-item>
        <text:list-item>
          <text:p text:style-name="P12">secondary mutations don't have a spawn rate (its 0)</text:p>
        </text:list-item>
      </text:list>
      <text:h text:style-name="Heading_20_1" text:outline-level="1"><text:span text:style-name="T1">O</text:span>utput</text:h>
      <text:list xml:id="list1003957217" text:style-name="L3">
        <text:list-item>
          <text:p text:style-name="P13">záznam o počte jednotlivých "druhov" v každom time stepe + charakteristika druhov (ich spawn, death, replication, mutation rate, ID)</text:p>
          <text:list>
            <text:list-item>
              <text:p text:style-name="P13">text file / db</text:p>
            </text:list-item>
            <text:list-item>
              <text:p text:style-name="P13"><text:span text:style-name="T4">(or) </text:span>graph </text:p>
              <text:list>
                <text:list-item>
                  <text:p text:style-name="P13">x: time step</text:p>
                </text:list-item>
                <text:list-item>
                  <text:p text:style-name="P13">y: number of existing replicators of respective types</text:p>
                </text:list-item>
              </text:list>
            </text:list-item>
            <text:list-item>
              <text:p text:style-name="P15">picture of the graph - .png</text:p>
            </text:list-item>
          </text:list>
        </text:list-item>
      </text:list>
      <text:h text:style-name="P6" text:outline-level="1">Additional details</text:h>
      <text:p text:style-name="Text_20_body">. "vývoj" každej mutácie <text:span text:style-name="T6">by</text:span> mohol bežať v samostatnom vlákne.<text:line-break/>. <text:span text:style-name="T6">mohlo by</text:span> bežať niekoľko simulácií paralelne vedľa seba.</text:p>
      <text:p text:style-name="Text_20_body">. <text:span text:style-name="T6">web server</text:span><text:span text:style-name="T7"><text:line-break/><text:tab/>- </text:span><text:span text:style-name="T6">accepts request</text:span><text:span text:style-name="T7"> </text:span><text:span text:style-name="T6">to create simulation (parameters)</text:span><text:span text:style-name="T7"><text:line-break/><text:tab/>- </text:span><text:span text:style-name="T6">returns array of data, or live state of data, or resulting image</text:span></text:p>
      <text:p text:style-name="P3"/>
      <text:h text:style-name="Heading_20_1" text:outline-level="1"><text:soft-page-break/>Simulation Parameters</text:h>
      <text:p text:style-name="P4">thesis: nature has setting such as ONE kind of Spontaneous Repliacator can emerge. Now we need to define:</text:p>
      <text:p text:style-name="P4">1. what are his stats<text:line-break/>2. how often does he emerge (what is the probability of emergence)<text:line-break/><text:tab/>- should this be affected by crowding factor? - let's say YES for now<text:line-break/>3. how abundant are materials needed for his emergence, i.e. Crowding Factor</text:p>
      <text:h text:style-name="Heading_20_2" text:outline-level="2">Predefined</text:h>
      <text:list xml:id="list1662530497" text:style-name="L4">
        <text:list-item>
          <text:p text:style-name="P16"><text:span text:style-name="T6">float </text:span>spawn<text:span text:style-name="T8">R</text:span>ate <text:span text:style-name="T8">(spawnProbaility ?)</text:span></text:p>
        </text:list-item>
        <text:list-item>
          <text:p text:style-name="P16"><text:span text:style-name="T6">int </text:span>crowding<text:span text:style-name="T8">F</text:span>actor</text:p>
        </text:list-item>
        <text:list-item>
          <text:p text:style-name="P18">float defaultDeathProbability</text:p>
        </text:list-item>
        <text:list-item>
          <text:p text:style-name="P18">float defaultRepliactionProbability</text:p>
        </text:list-item>
        <text:list-item>
          <text:p text:style-name="P18">float defaultMutationProbability</text:p>
        </text:list-item>
        <text:list-item>
          <text:p text:style-name="P18">float defaultVariationProbability</text:p>
        </text:list-item>
        <text:list-item>
          <text:p text:style-name="P18">int finalStepCount</text:p>
        </text:list-item>
      </text:list>
      <text:h text:style-name="Heading_20_2" text:outline-level="2">Monitored</text:h>
      <text:list xml:id="list2521994396" text:style-name="L5">
        <text:list-item>
          <text:p text:style-name="P20">int S – current step</text:p>
        </text:list-item>
        <text:list-item>
          <text:p text:style-name="P17">table <text:span text:style-name="T6">population</text:span> – <text:span text:style-name="T6">key – species, values – species, count</text:span></text:p>
          <text:list>
            <text:list-item>
              <text:p text:style-name="P19"><text:span text:style-name="T5">int N – total population (total number of molecules) </text:span><text:span text:style-name="T8">= sum of table's count values</text:span></text:p>
            </text:list-item>
          </text:list>
        </text:list-item>
      </text:list>
      <text:h text:style-name="Heading_20_1" text:outline-level="1">Pseudocode</text:h>
      <text:p text:style-name="P7">public class Simulation {</text:p>
      <text:p text:style-name="Preformatted_20_Text"><text:s text:c="4"/><text:span text:style-name="T9">public int finalStepCount;</text:span></text:p>
      <text:p text:style-name="Preformatted_20_Text"><text:s text:c="4"/><text:span text:style-name="T9">public int crowdingFactor; //i.e. resource abundance</text:span></text:p>
      <text:p text:style-name="Preformatted_20_Text"><text:s text:c="4"/><text:span text:style-name="T9">public float spawnProbability;</text:span></text:p>
      <text:p text:style-name="Preformatted_20_Text"><text:s text:c="4"/><text:span text:style-name="T9">public Replicator spontaneousReplicator;</text:span></text:p>
      <text:p text:style-name="P9"><text:span text:style-name="T9">}</text:span></text:p>
      <text:p text:style-name="P7">public class Replicator {</text:p>
      <text:p text:style-name="Preformatted_20_Text"><text:s text:c="4"/><text:span text:style-name="T9">public float deathProbability;</text:span></text:p>
      <text:p text:style-name="Preformatted_20_Text"><text:s text:c="4"/><text:span text:style-name="T9">public float replicationProbability;</text:span></text:p>
      <text:p text:style-name="Preformatted_20_Text"><text:s text:c="4"/><text:span text:style-name="T9">public float mutationProbability;</text:span></text:p>
      <text:p text:style-name="Preformatted_20_Text"><text:s text:c="4"/><text:span text:style-name="T9">public float variation;</text:span></text:p>
      <text:p text:style-name="P8">}</text:p>
      <text:p text:style-name="P7">public static void simulation(String simulationParameters) {</text:p>
      <text:p text:style-name="Preformatted_20_Text"><text:s text:c="8"/><text:span text:style-name="T9">//use some json library to extract the following - maybe put it in Simulation</text:span></text:p>
      <text:p text:style-name="Preformatted_20_Text"><text:s text:c="8"/><text:span text:style-name="T9">Simulation simulation = new Simulation();</text:span></text:p>
      <text:p text:style-name="Preformatted_20_Text"><text:s text:c="8"/><text:span text:style-name="T9">int step = 0;</text:span></text:p>
      <text:p text:style-name="Preformatted_20_Text"><text:s text:c="8"/><text:span text:style-name="T9">int population = 0;</text:span></text:p>
      <text:p text:style-name="Preformatted_20_Text"><text:s text:c="8"/><text:span text:style-name="T9">double chance;</text:span></text:p>
      <text:p text:style-name="Preformatted_20_Text"><text:s text:c="8"/><text:span text:style-name="T9">int replicationFactor = 1 - population / simulation.crowdingFactor;</text:span></text:p>
      <text:p text:style-name="Preformatted_20_Text"><text:soft-page-break/><text:s text:c="8"/><text:span text:style-name="T9">DynamicArray&lt;Replicator&gt; species = new DynamicArray&lt;Replicator&gt;();</text:span></text:p>
      <text:p text:style-name="Preformatted_20_Text"><text:s text:c="8"/><text:span text:style-name="T9">while (step &lt; simulation.finalStepCount) {</text:span></text:p>
      <text:p text:style-name="Preformatted_20_Text"><text:s text:c="12"/><text:span text:style-name="T9">chance = Math.random();</text:span></text:p>
      <text:p text:style-name="Preformatted_20_Text"><text:s text:c="12"/><text:span text:style-name="T9">if (chance &gt; simulation.spawnProbability * replicationFactor) {</text:span></text:p>
      <text:p text:style-name="Preformatted_20_Text"><text:s text:c="16"/><text:span text:style-name="T9">//create a copy of simulation.spontaneousReplicator - or just increase their numbers?</text:span></text:p>
      <text:p text:style-name="Preformatted_20_Text"><text:s text:c="12"/><text:span text:style-name="T9">}</text:span></text:p>
      <text:p text:style-name="Preformatted_20_Text"><text:s text:c="12"/><text:span text:style-name="T9">/*</text:span></text:p>
      <text:p text:style-name="Preformatted_20_Text"><text:s text:c="12"/><text:span text:style-name="T9">foreach species from previous steps:</text:span></text:p>
      <text:p text:style-name="Preformatted_20_Text"><text:s text:c="14"/><text:span text:style-name="T9">foreach member of species</text:span></text:p>
      <text:p text:style-name="Preformatted_20_Text"><text:s text:c="16"/><text:span text:style-name="T9">calculate</text:span></text:p>
      <text:p text:style-name="Preformatted_20_Text"><text:s text:c="17"/><text:span text:style-name="T9">- did he die?</text:span></text:p>
      <text:p text:style-name="Preformatted_20_Text"><text:s text:c="17"/><text:span text:style-name="T9">- did he replicate? take replicationFactor into the account</text:span></text:p>
      <text:p text:style-name="Preformatted_20_Text"><text:s text:c="20"/><text:span text:style-name="T9">if yes - calculate whether new member mutated</text:span></text:p>
      <text:p text:style-name="Preformatted_20_Text"><text:s text:c="22"/><text:span text:style-name="T9">if yes - apply variation to calculate new values -&gt; i.e. 50/50 whether -1 or +1 times variation + old value -&gt; cap at 1</text:span></text:p>
      <text:p text:style-name="Preformatted_20_Text"><text:s text:c="13"/><text:span text:style-name="T9">adjust population, replicationFactor</text:span></text:p>
      <text:p text:style-name="Preformatted_20_Text"><text:s text:c="13"/><text:span text:style-name="T9">*/</text:span></text:p>
      <text:p text:style-name="Preformatted_20_Text"/>
      <text:p text:style-name="Preformatted_20_Text"><text:s text:c="8"/><text:span text:style-name="T9">}</text:span></text:p>
      <text:p text:style-name="P9"><text:s text:c="4"/><text:span text:style-name="T9">}</text:span></text:p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2:40:39.423668981</meta:creation-date>
    <dc:date>2026-05-18T23:10:21.182055393</dc:date>
    <meta:editing-duration>PT5H10M1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550" meta:character-count="3856" meta:non-whitespace-character-count="3079"/>
  </office:meta>
</office:document-meta>
</file>